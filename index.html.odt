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de" class="scroll-smooth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Golius Automation | Automatisierung für Steuerkanzleien&lt;/title&gt;</text:p>
      <text:p text:style-name="Standard"><text:s text:c="4"/>&lt;meta name="description" content="Automatisierung für Steuerkanzleien. Weniger Verwaltungsaufwand. Mehr Zeit für Mandanten. Datenschutzorientierte und selbst gehostete Lösungen."&gt;</text:p>
      <text:p text:style-name="Standard"><text:s text:c="4"/>&lt;meta name="keywords" content="Automatisierung Steuerkanzlei, Prozessautomatisierung Steuerberater, Dokumentenautomatisierung Kanzlei, Datenschutz Automatisierung"&gt;</text:p>
      <text:p text:style-name="Standard"><text:s text:c="4"/>&lt;script src="https://cdn.tailwindcss.com"&gt;&lt;/script&gt;</text:p>
      <text:p text:style-name="Standard"><text:s text:c="4"/>&lt;script&gt;</text:p>
      <text:p text:style-name="Standard"><text:s text:c="8"/>tailwind.config = {</text:p>
      <text:p text:style-name="Standard"><text:s text:c="12"/>theme: {</text:p>
      <text:p text:style-name="Standard"><text:s text:c="16"/>extend: {</text:p>
      <text:p text:style-name="Standard"><text:s text:c="20"/>colors: {</text:p>
      <text:p text:style-name="Standard"><text:s text:c="24"/>kanzlei: {</text:p>
      <text:p text:style-name="Standard"><text:s text:c="28"/>slate: '#0f172a',</text:p>
      <text:p text:style-name="Standard"><text:s text:c="28"/>blue: '#1e3a8a',</text:p>
      <text:p text:style-name="Standard"><text:s text:c="28"/>accent: '#2563eb',</text:p>
      <text:p text:style-name="Standard"><text:s text:c="28"/>bg: '#f8fafc'</text:p>
      <text:p text:style-name="Standard"><text:s text:c="24"/>}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&lt;/script&gt;</text:p>
      <text:p text:style-name="Standard">&lt;/head&gt;</text:p>
      <text:p text:style-name="Standard">&lt;body class="bg-kanzlei-bg text-kanzlei-slate font-sans antialiased"&gt;</text:p>
      <text:p text:style-name="Standard"/>
      <text:p text:style-name="Standard"><text:s text:c="4"/>&lt;header class="sticky top-0 z-50 backdrop-blur-md bg-white/80 border-b border-slate-200"&gt;</text:p>
      <text:p text:style-name="Standard"><text:s text:c="8"/>&lt;div class="max-w-6xl mx-auto px-4 sm:px-6 lg:px-8 h-16 flex items-center justify-between"&gt;</text:p>
      <text:p text:style-name="Standard"><text:s text:c="12"/>&lt;div class="text-xl font-bold tracking-tight text-kanzlei-blue"&gt;</text:p>
      <text:p text:style-name="Standard"><text:s text:c="16"/>Golius &lt;span class="text-kanzlei-accent"&gt;Automation&lt;/span&gt;</text:p>
      <text:p text:style-name="Standard"><text:s text:c="12"/>&lt;/div&gt;</text:p>
      <text:p text:style-name="Standard"><text:s text:c="12"/>&lt;nav class="hidden md:flex space-x-8 text-sm font-medium text-slate-600"&gt;</text:p>
      <text:p text:style-name="Standard"><text:s text:c="16"/>&lt;a href="#probleme" class="hover:text-kanzlei-accent transition"&gt;Probleme&lt;/a&gt;</text:p>
      <text:p text:style-name="Standard"><text:s text:c="16"/>&lt;a href="#loesungen" class="hover:text-kanzlei-accent transition"&gt;Leistungen&lt;/a&gt;</text:p>
      <text:p text:style-name="Standard"><text:s text:c="16"/>&lt;a href="#datenschutz" class="hover:text-kanzlei-accent transition"&gt;Datenschutz&lt;/a&gt;</text:p>
      <text:p text:style-name="Standard"><text:s text:c="16"/>&lt;a href="#ablauf" class="hover:text-kanzlei-accent transition"&gt;Ablauf&lt;/a&gt;</text:p>
      <text:p text:style-name="Standard"><text:s text:c="16"/>&lt;a href="#faq" class="hover:text-kanzlei-accent transition"&gt;FAQ&lt;/a&gt;</text:p>
      <text:p text:style-name="Standard"><text:s text:c="12"/>&lt;/nav&gt;</text:p>
      <text:p text:style-name="Standard"><text:s text:c="12"/>&lt;div&gt;</text:p>
      <text:p text:style-name="Standard"><text:s text:c="16"/>&lt;a href="#kontakt" class="bg-kanzlei-slate text-white px-4 py-2 rounded-lg text-sm font-medium hover:bg-kanzlei-accent transition shadow-sm"&gt;</text:p>
      <text:p text:style-name="Standard"><text:s text:c="20"/>Kontakt</text:p>
      <text:p text:style-name="Standard"><text:s text:c="16"/>&lt;/a&gt;</text:p>
      <text:p text:style-name="Standard"><text:s text:c="12"/>&lt;/div&gt;</text:p>
      <text:p text:style-name="Standard"><text:s text:c="8"/>&lt;/div&gt;</text:p>
      <text:p text:style-name="Standard"><text:s text:c="4"/>&lt;/header&gt;</text:p>
      <text:p text:style-name="Standard"><text:soft-page-break/></text:p>
      <text:p text:style-name="Standard"><text:s text:c="4"/>&lt;section class="relative py-20 lg:py-32 overflow-hidden bg-white"&gt;</text:p>
      <text:p text:style-name="Standard"><text:s text:c="8"/>&lt;div class="max-w-6xl mx-auto px-4 sm:px-6 lg:px-8 relative z-10"&gt;</text:p>
      <text:p text:style-name="Standard"><text:s text:c="12"/>&lt;div class="max-w-3xl"&gt;</text:p>
      <text:p text:style-name="Standard"><text:s text:c="16"/>&lt;span class="text-xs font-semibold uppercase tracking-wider text-kanzlei-accent bg-blue-50 px-3 py-1 rounded-full"&gt;Positionierung&lt;/span&gt;</text:p>
      <text:p text:style-name="Standard"><text:s text:c="16"/>&lt;h1 class="mt-4 text-4xl sm:text-5xl lg:text-6xl font-extrabold tracking-tight text-kanzlei-slate"&gt;</text:p>
      <text:p text:style-name="Standard"><text:s text:c="20"/>Automatisierung für Steuerkanzleien</text:p>
      <text:p text:style-name="Standard"><text:s text:c="16"/>&lt;/h1&gt;</text:p>
      <text:p text:style-name="Standard"><text:s text:c="16"/>&lt;p class="mt-6 text-xl text-slate-600 leading-relaxed"&gt;</text:p>
      <text:p text:style-name="Standard"><text:s text:c="20"/>Reduzieren Sie Verwaltungsaufwand, beschleunigen Sie Dokumentenprozesse und entlasten Sie Ihr Team durch intelligente Automatisierung. Weniger Aufwand. Mehr Zeit für Mandanten.</text:p>
      <text:p text:style-name="Standard"><text:s text:c="16"/>&lt;/p&gt;</text:p>
      <text:p text:style-name="Standard"><text:s text:c="16"/>&lt;div class="mt-10"&gt;</text:p>
      <text:p text:style-name="Standard"><text:s text:c="20"/>&lt;a href="#kontakt" class="inline-flex items-center justify-center px-6 py-3 border border-transparent text-base font-medium rounded-xl text-white bg-kanzlei-accent hover:bg-blue-700 transition shadow-lg shadow-blue-500/20"&gt;</text:p>
      <text:p text:style-name="Standard"><text:s text:c="24"/>Kostenloses Beratungsgespräch vereinbaren</text:p>
      <text:p text:style-name="Standard"><text:s text:c="20"/>&lt;/a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8"/>&lt;div class="absolute top-0 right-0 w-1/2 h-full bg-slate-50 opacity-50 skew-x-12 transform origin-top-right hidden lg:block"&gt;&lt;/div&gt;</text:p>
      <text:p text:style-name="Standard"><text:s text:c="4"/>&lt;/section&gt;</text:p>
      <text:p text:style-name="Standard"/>
      <text:p text:style-name="Standard"><text:s text:c="4"/>&lt;section id="probleme" class="py-20 border-t border-slate-100"&gt;</text:p>
      <text:p text:style-name="Standard"><text:s text:c="8"/>&lt;div class="max-w-6xl mx-auto px-4 sm:px-6 lg:px-8"&gt;</text:p>
      <text:p text:style-name="Standard"><text:s text:c="12"/>&lt;div class="text-center max-w-3xl mx-auto"&gt;</text:p>
      <text:p text:style-name="Standard"><text:s text:c="16"/>&lt;h2 class="text-3xl font-bold tracking-tight text-kanzlei-slate"&gt;Herausforderungen im Kanzleialltag&lt;/h2&gt;</text:p>
      <text:p text:style-name="Standard"><text:s text:c="16"/>&lt;p class="mt-4 text-lg text-slate-600"&gt;Die Digitalisierung bringt Hürden mit sich, die wertvolle Ressourcen binden.&lt;/p&gt;</text:p>
      <text:p text:style-name="Standard"><text:s text:c="12"/>&lt;/div&gt;</text:p>
      <text:p text:style-name="Standard"><text:s text:c="12"/>&lt;div class="mt-12 grid grid-cols-1 gap-6 sm:grid-cols-2 lg:grid-cols-3"&gt;</text:p>
      <text:p text:style-name="Standard"><text:s text:c="16"/>&lt;div class="bg-white p-6 rounded-2xl border border-slate-200/60 shadow-sm"&gt;</text:p>
      <text:p text:style-name="Standard"><text:s text:c="20"/>&lt;div class="w-10 h-10 rounded-lg bg-red-50 flex items-center justify-center text-red-500 font-bold mb-4"&gt;✕&lt;/div&gt;</text:p>
      <text:p text:style-name="Standard"><text:s text:c="20"/>&lt;h3 class="text-lg font-semibold text-kanzlei-slate"&gt;Dokumentenflut &amp; E-Mails&lt;/h3&gt;</text:p>
      <text:p text:style-name="Standard"><text:s text:c="20"/>&lt;p class="mt-2 text-sm text-slate-600"&gt;Unstrukturierter Eingang von Belegen und permanent steigendes E-Mail-Aufkommen.&lt;/p&gt;</text:p>
      <text:p text:style-name="Standard"><text:s text:c="16"/>&lt;/div&gt;</text:p>
      <text:p text:style-name="Standard"><text:s text:c="16"/>&lt;div class="bg-white p-6 rounded-2xl border border-slate-200/60 shadow-sm"&gt;</text:p>
      <text:p text:style-name="Standard"><text:s text:c="20"/>&lt;div class="w-10 h-10 rounded-lg bg-red-50 flex items-center justify-center text-red-500 font-bold mb-4"&gt;✕&lt;/div&gt;</text:p>
      <text:p text:style-name="Standard"><text:s text:c="20"/>&lt;h3 class="text-lg font-semibold text-kanzlei-slate"&gt;Fristen &amp; Dateneingabe&lt;/h3&gt;</text:p>
      <text:p text:style-name="Standard"><text:s text:c="20"/>&lt;p class="mt-2 text-sm text-slate-600"&gt;Manuelle Übertragungen kosten Zeit und erhöhen das Risiko von Fehlern im Fristenmanagement.&lt;/p&gt;</text:p>
      <text:p text:style-name="Standard"><text:s text:c="16"/>&lt;/div&gt;</text:p>
      <text:p text:style-name="Standard"><text:soft-page-break/><text:s text:c="16"/>&lt;div class="bg-white p-6 rounded-2xl border border-slate-200/60 shadow-sm sm:col-span-2 lg:col-span-1"&gt;</text:p>
      <text:p text:style-name="Standard"><text:s text:c="20"/>&lt;div class="w-10 h-10 rounded-lg bg-red-50 flex items-center justify-center text-red-500 font-bold mb-4"&gt;✕&lt;/div&gt;</text:p>
      <text:p text:style-name="Standard"><text:s text:c="20"/>&lt;h3 class="text-lg font-semibold text-kanzlei-slate"&gt;Fachkräftemangel&lt;/h3&gt;</text:p>
      <text:p text:style-name="Standard"><text:s text:c="20"/>&lt;p class="mt-2 text-sm text-slate-600"&gt;Ineffiziente, repetitive Prozesse blockieren Ihre qualifizierten Mitarbeiter.&lt;/p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section id="loesungen" class="py-20 bg-white"&gt;</text:p>
      <text:p text:style-name="Standard"><text:s text:c="8"/>&lt;div class="max-w-6xl mx-auto px-4 sm:px-6 lg:px-8"&gt;</text:p>
      <text:p text:style-name="Standard"><text:s text:c="12"/>&lt;div class="text-center max-w-3xl mx-auto"&gt;</text:p>
      <text:p text:style-name="Standard"><text:s text:c="16"/>&lt;h2 class="text-3xl font-bold tracking-tight text-kanzlei-slate"&gt;Unsere Automatisierungs-Leistungen&lt;/h2&gt;</text:p>
      <text:p text:style-name="Standard"><text:s text:c="16"/>&lt;p class="mt-4 text-lg text-slate-600"&gt;Maßgeschneiderte Workflows für zukunftssichere Kanzleien.&lt;/p&gt;</text:p>
      <text:p text:style-name="Standard"><text:s text:c="12"/>&lt;/div&gt;</text:p>
      <text:p text:style-name="Standard"><text:s text:c="12"/>&lt;div class="mt-16 grid grid-cols-1 gap-8 sm:grid-cols-2"&gt;</text:p>
      <text:p text:style-name="Standard"><text:s text:c="16"/>&lt;div class="p-8 rounded-2xl border border-slate-100 bg-slate-50/50"&gt;</text:p>
      <text:p text:style-name="Standard"><text:s text:c="20"/>&lt;h3 class="text-xl font-bold text-kanzlei-slate"&gt;Dokumentenautomatisierung&lt;/h3&gt;</text:p>
      <text:p text:style-name="Standard"><text:s text:c="20"/>&lt;p class="mt-3 text-slate-600 leading-relaxed"&gt;Automatische Analyse, intelligente Klassifizierung, zielgerichtete Weiterleitung und strukturierte Ablage aller eingehenden Dokumente.&lt;/p&gt;</text:p>
      <text:p text:style-name="Standard"><text:s text:c="16"/>&lt;/div&gt;</text:p>
      <text:p text:style-name="Standard"><text:s text:c="16"/>&lt;div class="p-8 rounded-2xl border border-slate-100 bg-slate-50/50"&gt;</text:p>
      <text:p text:style-name="Standard"><text:s text:c="20"/>&lt;h3 class="text-xl font-bold text-kanzlei-slate"&gt;E-Mail-Automatisierung&lt;/h3&gt;</text:p>
      <text:p text:style-name="Standard"><text:s text:c="20"/>&lt;p class="mt-3 text-slate-600 leading-relaxed"&gt;Automatische Priorisierung Ihres Posteingangs, KI-gestützte Verarbeitung und präzise Vorbereitung von Antworten auf wiederkehrende Mandantenanfragen.&lt;/p&gt;</text:p>
      <text:p text:style-name="Standard"><text:s text:c="16"/>&lt;/div&gt;</text:p>
      <text:p text:style-name="Standard"><text:s text:c="16"/>&lt;div class="p-8 rounded-2xl border border-slate-100 bg-slate-50/50"&gt;</text:p>
      <text:p text:style-name="Standard"><text:s text:c="20"/>&lt;h3 class="text-xl font-bold text-kanzlei-slate"&gt;Prozessautomatisierung&lt;/h3&gt;</text:p>
      <text:p text:style-name="Standard"><text:s text:c="20"/>&lt;p class="mt-3 text-slate-600 leading-relaxed"&gt;Effiziente Strukturierung wiederkehrender Verwaltungs- und Geschäftsprozesse durch individuell auf Ihre Kanzlei abgestimmte digitale Workflows.&lt;/p&gt;</text:p>
      <text:p text:style-name="Standard"><text:s text:c="16"/>&lt;/div&gt;</text:p>
      <text:p text:style-name="Standard"><text:s text:c="16"/>&lt;div class="p-8 rounded-2xl border border-slate-100 bg-slate-50/50"&gt;</text:p>
      <text:p text:style-name="Standard"><text:s text:c="20"/>&lt;h3 class="text-xl font-bold text-kanzlei-slate"&gt;Individuelle Lösungen&lt;/h3&gt;</text:p>
      <text:p text:style-name="Standard"><text:s text:c="20"/>&lt;p class="mt-3 text-slate-600 leading-relaxed"&gt;Entwicklung kundenspezifischer Schnittstellen, tiefe Systemintegrationen und vollständige Digitalisierung komplexer, proprietärer Prozesse.&lt;/p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section id="datenschutz" class="py-20 bg-kanzlei-slate text-white"&gt;</text:p>
      <text:p text:style-name="Standard"><text:s text:c="8"/>&lt;div class="max-w-6xl mx-auto px-4 sm:px-6 lg:px-8"&gt;</text:p>
      <text:p text:style-name="Standard"><text:s text:c="12"/>&lt;div class="lg:flex lg:items-center lg:justify-between"&gt;</text:p>
      <text:p text:style-name="Standard"><text:soft-page-break/><text:s text:c="16"/>&lt;div class="max-w-xl"&gt;</text:p>
      <text:p text:style-name="Standard"><text:s text:c="20"/>&lt;span class="text-xs font-semibold uppercase tracking-wider text-kanzlei-accent bg-blue-500/10 px-3 py-1 rounded-full"&gt;Höchste Standards&lt;/span&gt;</text:p>
      <text:p text:style-name="Standard"><text:s text:c="20"/>&lt;h2 class="mt-4 text-3xl font-bold tracking-tight sm:text-4xl"&gt;Datenschutz &amp; Sicherheit an erster Stelle&lt;/h2&gt;</text:p>
      <text:p text:style-name="Standard"><text:s text:c="20"/>&lt;p class="mt-4 text-slate-400 leading-relaxed"&gt;</text:p>
      <text:p text:style-name="Standard"><text:s text:c="24"/>Gerade im Bereich der Steuerberatung sind Mandatendaten hochsensibel. Golius Automation setzt konsequent auf datenschutzorientierte Architekturen.</text:p>
      <text:p text:style-name="Standard"><text:s text:c="20"/>&lt;/p&gt;</text:p>
      <text:p text:style-name="Standard"><text:s text:c="16"/>&lt;/div&gt;</text:p>
      <text:p text:style-name="Standard"><text:s text:c="16"/>&lt;div class="mt-10 lg:mt-0 grid grid-cols-1 gap-4 sm:grid-cols-2 lg:max-w-xl w-full"&gt;</text:p>
      <text:p text:style-name="Standard"><text:s text:c="20"/>&lt;div class="p-6 rounded-xl bg-white/5 border border-white/10"&gt;</text:p>
      <text:p text:style-name="Standard"><text:s text:c="24"/>&lt;h4 class="font-semibold text-white"&gt;Self-Hosted Infrastruktur&lt;/h4&gt;</text:p>
      <text:p text:style-name="Standard"><text:s text:c="24"/>&lt;p class="mt-2 text-sm text-slate-400"&gt;Die Daten verbleiben vollständig in Ihrer eigenen, kontrollierten Serverumgebung.&lt;/p&gt;</text:p>
      <text:p text:style-name="Standard"><text:s text:c="20"/>&lt;/div&gt;</text:p>
      <text:p text:style-name="Standard"><text:s text:c="20"/>&lt;div class="p-6 rounded-xl bg-white/5 border border-white/10"&gt;</text:p>
      <text:p text:style-name="Standard"><text:s text:c="24"/>&lt;h4 class="font-semibold text-white"&gt;Rollenbasierte Zugriffe&lt;/h4&gt;</text:p>
      <text:p text:style-name="Standard"><text:s text:c="24"/>&lt;p class="mt-2 text-sm text-slate-400"&gt;Präzise Berechtigungsstrukturen sichern den Zugriff vor unbefugten internen und externen Blicken.&lt;/p&gt;</text:p>
      <text:p text:style-name="Standard"><text:s text:c="20"/>&lt;/div&gt;</text:p>
      <text:p text:style-name="Standard"><text:s text:c="20"/>&lt;div class="p-6 rounded-xl bg-white/5 border border-white/10"&gt;</text:p>
      <text:p text:style-name="Standard"><text:s text:c="24"/>&lt;h4 class="font-semibold text-white"&gt;Volle Datenkontrolle&lt;/h4&gt;</text:p>
      <text:p text:style-name="Standard"><text:s text:c="24"/>&lt;p class="mt-2 text-sm text-slate-400"&gt;Kein ungefragter Abfluss an Drittanbieter-Cloud-Dienste. Nachvollziehbare Prozesse pur.&lt;/p&gt;</text:p>
      <text:p text:style-name="Standard"><text:s text:c="20"/>&lt;/div&gt;</text:p>
      <text:p text:style-name="Standard"><text:s text:c="20"/>&lt;div class="p-6 rounded-xl bg-white/5 border border-white/10"&gt;</text:p>
      <text:p text:style-name="Standard"><text:s text:c="24"/>&lt;h4 class="font-semibold text-white"&gt;Moderne KI-Unterstützung&lt;/h4&gt;</text:p>
      <text:p text:style-name="Standard"><text:s text:c="24"/>&lt;p class="mt-2 text-sm text-slate-400"&gt;Smarte Algorithmen, kombiniert mit lokaler und sicherer Datenhoheit.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section id="ablauf" class="py-20 bg-white"&gt;</text:p>
      <text:p text:style-name="Standard"><text:s text:c="8"/>&lt;div class="max-w-6xl mx-auto px-4 sm:px-6 lg:px-8"&gt;</text:p>
      <text:p text:style-name="Standard"><text:s text:c="12"/>&lt;div class="text-center max-w-3xl mx-auto"&gt;</text:p>
      <text:p text:style-name="Standard"><text:s text:c="16"/>&lt;h2 class="text-3xl font-bold tracking-tight text-kanzlei-slate"&gt;Der Weg zu Ihrer automatisierten Kanzlei&lt;/h2&gt;</text:p>
      <text:p text:style-name="Standard"><text:s text:c="16"/>&lt;p class="mt-4 text-lg text-slate-600"&gt;Ein strukturierter Einführungsprozess garantiert minimalen Aufwand für Ihr Team.&lt;/p&gt;</text:p>
      <text:p text:style-name="Standard"><text:s text:c="12"/>&lt;/div&gt;</text:p>
      <text:p text:style-name="Standard"/>
      <text:p text:style-name="Standard"><text:s text:c="12"/>&lt;div class="mt-16 grid grid-cols-1 md:grid-cols-3 gap-8 relative"&gt;</text:p>
      <text:p text:style-name="Standard"><text:s text:c="16"/>&lt;div class="relative bg-kanzlei-bg p-8 rounded-2xl border border-slate-100"&gt;</text:p>
      <text:p text:style-name="Standard"><text:s text:c="20"/>&lt;div class="absolute -top-4 left-6 bg-kanzlei-accent text-white w-8 h-8 rounded-full flex items-center justify-center font-bold text-sm"&gt;1&lt;/div&gt;</text:p>
      <text:p text:style-name="Standard"><text:s text:c="20"/>&lt;h3 class="text-lg font-bold mt-2 text-kanzlei-slate"&gt;Anwendungsbeispiele definieren&lt;/h3&gt;</text:p>
      <text:p text:style-name="Standard"><text:soft-page-break/><text:s text:c="20"/>&lt;p class="mt-2 text-sm text-slate-600"&gt;Gemeinsam identifizieren wir lohnende Abläufe wie Dokumenteneingang, Mandantenanfragen oder Fristenabgleiche.&lt;/p&gt;</text:p>
      <text:p text:style-name="Standard"><text:s text:c="16"/>&lt;/div&gt;</text:p>
      <text:p text:style-name="Standard"><text:s text:c="16"/>&lt;div class="relative bg-kanzlei-bg p-8 rounded-2xl border border-slate-100"&gt;</text:p>
      <text:p text:style-name="Standard"><text:s text:c="20"/>&lt;div class="absolute -top-4 left-6 bg-kanzlei-accent text-white w-8 h-8 rounded-full flex items-center justify-center font-bold text-sm"&gt;2&lt;/div&gt;</text:p>
      <text:p text:style-name="Standard"><text:s text:c="20"/>&lt;h3 class="text-lg font-bold mt-2 text-kanzlei-slate"&gt;Individuelle Anpassung&lt;/h3&gt;</text:p>
      <text:p text:style-name="Standard"><text:s text:c="20"/>&lt;p class="mt-2 text-sm text-slate-600"&gt;Schnittstellen werden synchronisiert und Workflows exakt nach Ihren Kanzleivorgaben aufgesetzt.&lt;/p&gt;</text:p>
      <text:p text:style-name="Standard"><text:s text:c="16"/>&lt;/div&gt;</text:p>
      <text:p text:style-name="Standard"><text:s text:c="16"/>&lt;div class="relative bg-kanzlei-bg p-8 rounded-2xl border border-slate-100"&gt;</text:p>
      <text:p text:style-name="Standard"><text:s text:c="20"/>&lt;div class="absolute -top-4 left-6 bg-kanzlei-accent text-white w-8 h-8 rounded-full flex items-center justify-center font-bold text-sm"&gt;3&lt;/div&gt;</text:p>
      <text:p text:style-name="Standard"><text:s text:c="20"/>&lt;h3 class="text-lg font-bold mt-2 text-kanzlei-slate"&gt;Langfristige Betreuung&lt;/h3&gt;</text:p>
      <text:p text:style-name="Standard"><text:s text:c="20"/>&lt;p class="mt-2 text-sm text-slate-600"&gt;Nach der erfolgreichen Implementierung begleiten wir Sie kontinuierlich und optimieren bei Bedarf.&lt;/p&gt;</text:p>
      <text:p text:style-name="Standard"><text:s text:c="16"/>&lt;/div&gt;</text:p>
      <text:p text:style-name="Standard"><text:s text:c="12"/>&lt;/div&gt;</text:p>
      <text:p text:style-name="Standard"/>
      <text:p text:style-name="Standard"><text:s text:c="12"/>&lt;div class="mt-16 bg-slate-50 border border-slate-200/60 rounded-3xl p-8 md:p-12 grid grid-cols-2 lg:grid-cols-4 gap-6 text-center"&gt;</text:p>
      <text:p text:style-name="Standard"><text:s text:c="16"/>&lt;div&gt;</text:p>
      <text:p text:style-name="Standard"><text:s text:c="20"/>&lt;div class="text-3xl font-extrabold text-kanzlei-accent"&gt;⏱&lt;/div&gt;</text:p>
      <text:p text:style-name="Standard"><text:s text:c="20"/>&lt;div class="mt-2 font-semibold text-kanzlei-slate"&gt;Zeitersparnis&lt;/div&gt;</text:p>
      <text:p text:style-name="Standard"><text:s text:c="16"/>&lt;/div&gt;</text:p>
      <text:p text:style-name="Standard"><text:s text:c="16"/>&lt;div&gt;</text:p>
      <text:p text:style-name="Standard"><text:s text:c="20"/>&lt;div class="text-3xl font-extrabold text-kanzlei-accent"&gt;🛡&lt;/div&gt;</text:p>
      <text:p text:style-name="Standard"><text:s text:c="20"/>&lt;div class="mt-2 font-semibold text-kanzlei-slate"&gt;Weniger Fehler&lt;/div&gt;</text:p>
      <text:p text:style-name="Standard"><text:s text:c="16"/>&lt;/div&gt;</text:p>
      <text:p text:style-name="Standard"><text:s text:c="16"/>&lt;div&gt;</text:p>
      <text:p text:style-name="Standard"><text:s text:c="20"/>&lt;div class="text-3xl font-extrabold text-kanzlei-accent"&gt;👥&lt;/div&gt;</text:p>
      <text:p text:style-name="Standard"><text:s text:c="20"/>&lt;div class="mt-2 font-semibold text-kanzlei-slate"&gt;Mitarbeiterentlastung&lt;/div&gt;</text:p>
      <text:p text:style-name="Standard"><text:s text:c="16"/>&lt;/div&gt;</text:p>
      <text:p text:style-name="Standard"><text:s text:c="16"/>&lt;div&gt;</text:p>
      <text:p text:style-name="Standard"><text:s text:c="20"/>&lt;div class="text-3xl font-extrabold text-kanzlei-accent"&gt;📈&lt;/div&gt;</text:p>
      <text:p text:style-name="Standard"><text:s text:c="20"/>&lt;div class="mt-2 font-semibold text-kanzlei-slate"&gt;Höhere Skalierbarkeit&lt;/div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section id="faq" class="py-20 border-t border-slate-200 bg-kanzlei-bg"&gt;</text:p>
      <text:p text:style-name="Standard"><text:s text:c="8"/>&lt;div class="max-w-4xl mx-auto px-4 sm:px-6"&gt;</text:p>
      <text:p text:style-name="Standard"><text:s text:c="12"/>&lt;div class="text-center"&gt;</text:p>
      <text:p text:style-name="Standard"><text:s text:c="16"/>&lt;h2 class="text-3xl font-bold tracking-tight text-kanzlei-slate"&gt;Häufige Fragen &amp; Einwände&lt;/h2&gt;</text:p>
      <text:p text:style-name="Standard"><text:s text:c="16"/>&lt;p class="mt-4 text-lg text-slate-600"&gt;Transparente Antworten für Entscheider.&lt;/p&gt;</text:p>
      <text:p text:style-name="Standard"><text:s text:c="12"/>&lt;/div&gt;</text:p>
      <text:p text:style-name="Standard"><text:s text:c="12"/>&lt;div class="mt-12 space-y-6"&gt;</text:p>
      <text:p text:style-name="Standard"><text:s text:c="16"/>&lt;div class="bg-white p-6 rounded-xl shadow-sm border border-slate-200/60"&gt;</text:p>
      <text:p text:style-name="Standard"><text:s text:c="20"/>&lt;h4 class="font-bold text-kanzlei-slate"&gt;Unsere Prozesse sind viel zu individuell?&lt;/h4&gt;</text:p>
      <text:p text:style-name="Standard"><text:soft-page-break/><text:s text:c="20"/>&lt;p class="mt-2 text-sm text-slate-600"&gt;Genau hier liegt unsere Stärke: Wir pressen Sie in kein starres Korsett, sondern entwickeln und konfigurieren Lösungen komplett individuell angepasst an Ihre etablierten Strukturen.&lt;/p&gt;</text:p>
      <text:p text:style-name="Standard"><text:s text:c="16"/>&lt;/div&gt;</text:p>
      <text:p text:style-name="Standard"><text:s text:c="16"/>&lt;div class="bg-white p-6 rounded-xl shadow-sm border border-slate-200/60"&gt;</text:p>
      <text:p text:style-name="Standard"><text:s text:c="20"/>&lt;h4 class="font-bold text-kanzlei-slate"&gt;Welche Daten verlassen unser Unternehmen?&lt;/h4&gt;</text:p>
      <text:p text:style-name="Standard"><text:s text:c="20"/>&lt;p class="mt-2 text-sm text-slate-600"&gt;Durch unseren Fokus auf kontrollierte Datenflüsse und Self-Hosting-Infrastrukturen behalten Sie zu jedem Zeitpunkt die volle Hoheit und Kontrolle über alle Mandantendaten.&lt;/p&gt;</text:p>
      <text:p text:style-name="Standard"><text:s text:c="16"/>&lt;/div&gt;</text:p>
      <text:p text:style-name="Standard"><text:s text:c="16"/>&lt;div class="bg-white p-6 rounded-xl shadow-sm border border-slate-200/60"&gt;</text:p>
      <text:p text:style-name="Standard"><text:s text:c="20"/>&lt;h4 class="font-bold text-kanzlei-slate"&gt;Wir haben aktuell absolut keine Zeit für ein IT-Projekt?&lt;/h4&gt;</text:p>
      <text:p text:style-name="Standard"><text:s text:c="20"/>&lt;p class="mt-2 text-sm text-slate-600"&gt;Unser strukturierter Einführungsprozess ist so konzipiert, dass Ihr Tagesgeschäft kaum tangiert wird. Wir übernehmen die schwere Arbeit, um Ihnen schnellstmöglich Freiräume zu schaffen.&lt;/p&gt;</text:p>
      <text:p text:style-name="Standard"><text:s text:c="16"/>&lt;/div&gt;</text:p>
      <text:p text:style-name="Standard"><text:s text:c="16"/>&lt;div class="bg-white p-6 rounded-xl shadow-sm border border-slate-200/60"&gt;</text:p>
      <text:p text:style-name="Standard"><text:s text:c="20"/>&lt;h4 class="font-bold text-kanzlei-slate"&gt;Welche Systeme können integriert werden?&lt;/h4&gt;</text:p>
      <text:p text:style-name="Standard"><text:s text:c="20"/>&lt;p class="mt-2 text-sm text-slate-600"&gt;Wir binden gängige Kanzleisoftware, E-Mail-Server sowie Vorsysteme und Datenbanken nahtlos über standardisierte oder eigens entwickelte Schnittstellen an.&lt;/p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section id="kontakt" class="py-20 bg-white border-t border-slate-100"&gt;</text:p>
      <text:p text:style-name="Standard"><text:s text:c="8"/>&lt;div class="max-w-3xl mx-auto px-4 sm:px-6"&gt;</text:p>
      <text:p text:style-name="Standard"><text:s text:c="12"/>&lt;div class="text-center"&gt;</text:p>
      <text:p text:style-name="Standard"><text:s text:c="16"/>&lt;h2 class="text-3xl font-bold tracking-tight text-kanzlei-slate"&gt;Jetzt unverbindliches Beratungsgespräch anfragen&lt;/h2&gt;</text:p>
      <text:p text:style-name="Standard"><text:s text:c="16"/>&lt;p class="mt-4 text-slate-600"&gt;Lassen Sie uns gemeinsam herausfinden, welche Potenziale in Ihrer Kanzlei schlummern.&lt;/p&gt;</text:p>
      <text:p text:style-name="Standard"><text:s text:c="12"/>&lt;/div&gt;</text:p>
      <text:p text:style-name="Standard"><text:s text:c="12"/>&lt;div class="mt-12"&gt;</text:p>
      <text:p text:style-name="Standard"><text:s text:c="16"/>&lt;form action="https://api.web3forms.com/submit" method="POST" class="grid grid-cols-1 gap-y-6 sm:grid-cols-2 sm:gap-x-8"&gt;</text:p>
      <text:p text:style-name="Standard"><text:s text:c="20"/>&lt;input type="hidden" name="access_key" value="YOUR_ACCESS_KEY_HERE"&gt;</text:p>
      <text:p text:style-name="Standard"><text:s text:c="20"/></text:p>
      <text:p text:style-name="Standard"><text:s text:c="20"/>&lt;div&gt;</text:p>
      <text:p text:style-name="Standard"><text:s text:c="24"/>&lt;label for="name" class="block text-sm font-medium text-slate-700"&gt;Name&lt;/label&gt;</text:p>
      <text:p text:style-name="Standard"><text:s text:c="24"/>&lt;div class="mt-1"&gt;</text:p>
      <text:p text:style-name="Standard"><text:s text:c="28"/>&lt;input type="text" name="name" id="name" required class="block w-full rounded-lg border-slate-300 bg-slate-50 py-3 px-4 text-sm border focus:border-kanzlei-accent focus:ring-1 focus:ring-kanzlei-accent outline-none transition"&gt;</text:p>
      <text:p text:style-name="Standard"><text:s text:c="24"/>&lt;/div&gt;</text:p>
      <text:p text:style-name="Standard"><text:s text:c="20"/>&lt;/div&gt;</text:p>
      <text:p text:style-name="Standard"><text:s text:c="20"/>&lt;div&gt;</text:p>
      <text:p text:style-name="Standard"><text:soft-page-break/><text:s text:c="24"/>&lt;label for="kanzlei" class="block text-sm font-medium text-slate-700"&gt;Kanzlei / Unternehmen&lt;/label&gt;</text:p>
      <text:p text:style-name="Standard"><text:s text:c="24"/>&lt;div class="mt-1"&gt;</text:p>
      <text:p text:style-name="Standard"><text:s text:c="28"/>&lt;input type="text" name="kanzlei" id="kanzlei" class="block w-full rounded-lg border-slate-300 bg-slate-50 py-3 px-4 text-sm border focus:border-kanzlei-accent focus:ring-1 focus:ring-kanzlei-accent outline-none transition"&gt;</text:p>
      <text:p text:style-name="Standard"><text:s text:c="24"/>&lt;/div&gt;</text:p>
      <text:p text:style-name="Standard"><text:s text:c="20"/>&lt;/div&gt;</text:p>
      <text:p text:style-name="Standard"><text:s text:c="20"/>&lt;div class="sm:col-span-2"&gt;</text:p>
      <text:p text:style-name="Standard"><text:s text:c="24"/>&lt;label for="email" class="block text-sm font-medium text-slate-700"&gt;E-Mail-Adresse&lt;/label&gt;</text:p>
      <text:p text:style-name="Standard"><text:s text:c="24"/>&lt;div class="mt-1"&gt;</text:p>
      <text:p text:style-name="Standard"><text:s text:c="28"/>&lt;input type="email" name="email" id="email" required class="block w-full rounded-lg border-slate-300 bg-slate-50 py-3 px-4 text-sm border focus:border-kanzlei-accent focus:ring-1 focus:ring-kanzlei-accent outline-none transition"&gt;</text:p>
      <text:p text:style-name="Standard"><text:s text:c="24"/>&lt;/div&gt;</text:p>
      <text:p text:style-name="Standard"><text:s text:c="20"/>&lt;/div&gt;</text:p>
      <text:p text:style-name="Standard"><text:s text:c="20"/>&lt;div class="sm:col-span-2"&gt;</text:p>
      <text:p text:style-name="Standard"><text:s text:c="24"/>&lt;label for="message" class="block text-sm font-medium text-slate-700"&gt;Nachricht (Optional)&lt;/label&gt;</text:p>
      <text:p text:style-name="Standard"><text:s text:c="24"/>&lt;div class="mt-1"&gt;</text:p>
      <text:p text:style-name="Standard"><text:s text:c="28"/>&lt;textarea id="message" name="message" rows="4" class="block w-full rounded-lg border-slate-300 bg-slate-50 py-3 px-4 text-sm border focus:border-kanzlei-accent focus:ring-1 focus:ring-kanzlei-accent outline-none transition"&gt;&lt;/textarea&gt;</text:p>
      <text:p text:style-name="Standard"><text:s text:c="24"/>&lt;/div&gt;</text:p>
      <text:p text:style-name="Standard"><text:s text:c="20"/>&lt;/div&gt;</text:p>
      <text:p text:style-name="Standard"><text:s text:c="20"/>&lt;div class="sm:col-span-2"&gt;</text:p>
      <text:p text:style-name="Standard"><text:s text:c="24"/>&lt;button type="submit" class="w-full inline-flex items-center justify-center px-6 py-3 border border-transparent rounded-xl shadow-md text-base font-medium text-white bg-kanzlei-slate hover:bg-kanzlei-accent transition"&gt;</text:p>
      <text:p text:style-name="Standard"><text:s text:c="28"/>Termin vereinbaren</text:p>
      <text:p text:style-name="Standard"><text:s text:c="24"/>&lt;/button&gt;</text:p>
      <text:p text:style-name="Standard"><text:s text:c="20"/>&lt;/div&gt;</text:p>
      <text:p text:style-name="Standard"><text:s text:c="16"/>&lt;/form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footer class="bg-slate-900 text-slate-400 py-12 border-t border-slate-800 text-xs"&gt;</text:p>
      <text:p text:style-name="Standard"><text:s text:c="8"/>&lt;div class="max-w-6xl mx-auto px-4 sm:px-6 lg:px-8 flex flex-col md:flex-row items-center justify-between gap-6"&gt;</text:p>
      <text:p text:style-name="Standard"><text:s text:c="12"/>&lt;div&gt;</text:p>
      <text:p text:style-name="Standard"><text:s text:c="16"/>&lt;p&gt;&amp;copy; 2026 Golius Automation. Alle Rechte vorbehalten.&lt;/p&gt;</text:p>
      <text:p text:style-name="Standard"><text:s text:c="16"/>&lt;p class="mt-1 text-slate-500"&gt;Fokus auf B2B-SaaS-Stil, Klarheit und Vertrauen.&lt;/p&gt;</text:p>
      <text:p text:style-name="Standard"><text:s text:c="12"/>&lt;/div&gt;</text:p>
      <text:p text:style-name="Standard"><text:s text:c="12"/>&lt;div class="flex space-x-6"&gt;</text:p>
      <text:p text:style-name="Standard"><text:s text:c="16"/>&lt;a href="#" class="hover:text-white transition"&gt;Impressum&lt;/a&gt;</text:p>
      <text:p text:style-name="Standard"><text:s text:c="16"/>&lt;a href="#" class="hover:text-white transition"&gt;Datenschutz&lt;/a&gt;</text:p>
      <text:p text:style-name="Standard"><text:s text:c="12"/>&lt;/div&gt;</text:p>
      <text:p text:style-name="Standard"><text:s text:c="8"/>&lt;/div&gt;</text:p>
      <text:p text:style-name="Standard"><text:s text:c="4"/>&lt;/footer&gt;</text:p>
      <text:p text:style-name="Standard"/>
      <text:p text:style-name="Standard"><text:soft-page-break/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9T08:59:41.301291800</meta:creation-date>
    <dc:date>2026-06-09T09:00:08.505981500</dc:date>
    <meta:editing-duration>PT28S</meta:editing-duration>
    <meta:editing-cycles>1</meta:editing-cycles>
    <meta:document-statistic meta:table-count="0" meta:image-count="0" meta:object-count="0" meta:page-count="8" meta:paragraph-count="273" meta:word-count="1401" meta:character-count="19811" meta:non-whitespace-character-count="14450"/>
    <meta:generator>LibreOffice/25.8.4.1$Windows_X86_64 LibreOffice_project/6ab4ab096601e7cd763971a4dad5a6c7322a1a59</meta:generator>
  </office:meta>
</office:document-meta>
</file>